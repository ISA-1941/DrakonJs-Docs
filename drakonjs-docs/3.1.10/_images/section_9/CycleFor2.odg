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800000255425D71D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616cm" svg:x="1.052cm" svg:y="7.571cm">
          <draw:image xlink:href="Pictures/100000000000030800000255425D71D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8T23:10:30.739381110</meta:creation-date>
    <dc:date>2026-07-08T23:23:25.323881124</dc:date>
    <meta:editing-duration>PT2M40S</meta:editing-duration>
    <meta:editing-cycles>1</meta:editing-cycles>
    <meta:document-statistic meta:object-count="1"/>
    <meta:generator>LibreOffice/24.2.7.2$Linux_X86_64 LibreOffice_project/420$Build-2</meta:generator>
  </office:meta>
</office:document-meta>
</file>