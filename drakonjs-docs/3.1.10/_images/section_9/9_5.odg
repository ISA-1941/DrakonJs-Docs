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22E5AF6D3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19cm" svg:height="14.763cm" svg:x="3.981cm" svg:y="7.611cm">
          <draw:image xlink:href="Pictures/10000000000001FF0000022E5AF6D3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01:01:56.677887457</meta:creation-date>
    <dc:date>2026-07-06T01:03:02.431844524</dc:date>
    <meta:editing-duration>PT1M6S</meta:editing-duration>
    <meta:editing-cycles>1</meta:editing-cycles>
    <meta:document-statistic meta:object-count="1"/>
    <meta:generator>LibreOffice/24.2.7.2$Linux_X86_64 LibreOffice_project/420$Build-2</meta:generator>
  </office:meta>
</office:document-meta>
</file>