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6347in"/>
    </style:style>
    <style:style style:name="Table1.B" style:family="table-column">
      <style:table-column-properties style:column-width="4.290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8354in"/>
    </style:style>
    <style:style style:name="Table2.B" style:family="table-column">
      <style:table-column-properties style:column-width="4.089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2618in" table:align="left"/>
    </style:style>
    <style:style style:name="Table3.A" style:family="table-column">
      <style:table-column-properties style:column-width="1.2764in"/>
    </style:style>
    <style:style style:name="Table3.B" style:family="table-column">
      <style:table-column-properties style:column-width="4.985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0722in" table:align="left"/>
    </style:style>
    <style:style style:name="Table4.A" style:family="table-column">
      <style:table-column-properties style:column-width="2.784in"/>
    </style:style>
    <style:style style:name="Table4.B" style:family="table-column">
      <style:table-column-properties style:column-width="3.288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rsid="00111a1b" officeooo:paragraph-rsid="00111a1b"/>
    </style:style>
    <style:style style:name="P2" style:family="paragraph" style:parent-style-name="Heading_20_2">
      <style:text-properties officeooo:rsid="00137c5f" officeooo:paragraph-rsid="00137c5f"/>
    </style:style>
    <style:style style:name="P3" style:family="paragraph" style:parent-style-name="Standard">
      <style:text-properties officeooo:rsid="0010c43d" officeooo:paragraph-rsid="0010c43d"/>
    </style:style>
    <style:style style:name="P4" style:family="paragraph" style:parent-style-name="Standard">
      <style:text-properties officeooo:rsid="00111a1b" officeooo:paragraph-rsid="00111a1b"/>
    </style:style>
    <style:style style:name="P5" style:family="paragraph" style:parent-style-name="Standard">
      <style:text-properties officeooo:rsid="00137c5f" officeooo:paragraph-rsid="00137c5f"/>
    </style:style>
    <style:style style:name="P6" style:family="paragraph" style:parent-style-name="Standard">
      <style:text-properties officeooo:rsid="00137c5f" officeooo:paragraph-rsid="00159c20"/>
    </style:style>
    <style:style style:name="P7" style:family="paragraph" style:parent-style-name="Text_20_body">
      <style:text-properties officeooo:paragraph-rsid="00159c20"/>
    </style:style>
    <style:style style:name="P8" style:family="paragraph">
      <style:paragraph-properties fo:margin-top="0.1654in" fo:margin-bottom="0.1374in" fo:text-align="start"/>
      <style:text-properties fo:font-size="10pt" style:font-size-asian="10pt" style:font-size-complex="10pt"/>
    </style:style>
    <style:style style:name="P9" style:family="paragraph">
      <style:paragraph-properties fo:margin-top="0.1654in" fo:margin-bottom="0.1374in"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F" fo:font-size="12pt"/>
    </style:style>
    <style:style style:name="P12" style:family="paragraph">
      <loext:graphic-properties draw:fill="solid" draw:fill-color="#0000b3"/>
    </style:style>
    <style:style style:name="P13" style:family="paragraph">
      <style:text-properties fo:font-size="10pt"/>
    </style:style>
    <style:style style:name="P14" style:family="paragraph">
      <style:text-properties style:font-name="F" fo:font-size="10pt"/>
    </style:style>
    <style:style style:name="P15" style:family="paragraph">
      <loext:graphic-properties draw:fill="solid" draw:fill-color="#0000b3"/>
      <style:text-properties fo:font-size="10pt"/>
    </style:style>
    <style:style style:name="P16" style:family="paragraph">
      <loext:graphic-properties draw:fill="solid" draw:fill-color="#c4febb"/>
      <style:paragraph-properties fo:margin-top="0.1654in" fo:margin-bottom="0.1374in" fo:text-align="start"/>
      <style:text-properties fo:font-size="10pt" style:font-size-asian="10pt" style:font-size-complex="10pt"/>
    </style:style>
    <style:style style:name="T1" style:family="text">
      <style:text-properties officeooo:rsid="0014591a"/>
    </style:style>
    <style:style style:name="T2" style:family="text">
      <style:text-properties style:font-name="F" fo:font-size="10pt"/>
    </style:style>
    <style:style style:name="T3" style:family="text">
      <style:text-properties fo:font-size="10pt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0000b3" fo:min-height="0.6937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hyperlink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3" style:family="graphic">
      <style:graphic-properties draw:stroke="none" draw:fill="solid" draw:fill-color="#0000b3" fo:min-height="0.5091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hyperlink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4" style:family="graphic">
      <style:graphic-properties draw:stroke="none" svg:stroke-color="#000000" draw:fill="solid" draw:fill-color="#c4febb" fo:min-height="1.2799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.07.26 Работа по дизайну. Центрирование текста</text:p>
      <text:p text:style-name="P3"/>
      <text:p text:style-name="P3">Обзор папки supplemental-ui <text:s/>по команде: <text:s text:c="8"/>find supplemental-ui -maxdepth 3 -type f | sort</text:p>
      <text:p text:style-name="P3">Результат обзора:</text:p>
      <text:p text:style-name="P3">supplemental-ui/css/site.css</text:p>
      <text:p text:style-name="P3">supplemental-ui/js/nav-hamburgers.js</text:p>
      <text:p text:style-name="P3">supplemental-ui/partials/footer-scripts.hbs</text:p>
      <text:p text:style-name="P3">supplemental-ui/partials/toolbar.hbs</text:p>
      <text:p text:style-name="P3"/>
      <text:p text:style-name="P3">Создаем таблицу 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Файл в <text:span text:style-name="Source_20_Text">supplemental-ui</text:span></text:p>
            </table:table-cell>
            <table:table-cell table:style-name="Table1.A1" office:value-type="string">
              <text:p text:style-name="Table_20_Heading">Назначение в философии Antora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upplemental-ui/css/site.css</text:span></text:p>
          </table:table-cell>
          <table:table-cell table:style-name="Table1.A1" office:value-type="string">
            <text:p text:style-name="Table_20_Contents">Локальный файл с тем же именем, что и стандартный CSS Antora. Может подменять базовый дизайн. Пока не трогаем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pplemental-ui/js/nav-hamburgers.js</text:span></text:p>
          </table:table-cell>
          <table:table-cell table:style-name="Table1.A1" office:value-type="string">
            <text:p text:style-name="Table_20_Contents">Ваш JavaScript для управления hamburger-меню. Сам по себе не работает, если не подключён через шаблон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pplemental-ui/partials/footer-scripts.hbs</text:span></text:p>
          </table:table-cell>
          <table:table-cell table:style-name="Table1.A1" office:value-type="string">
            <text:p text:style-name="Table_20_Contents">Место, куда обычно добавляют подключения JavaScript перед закрытием страницы. Позже через него подключим <text:span text:style-name="Source_20_Text">nav-hamburgers.js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pplemental-ui/partials/toolbar.hbs</text:span></text:p>
          </table:table-cell>
          <table:table-cell table:style-name="Table1.A1" office:value-type="string">
            <text:p text:style-name="Table_20_Contents">Шаблон панели инструментов Antora. Если он есть в <text:span text:style-name="Source_20_Text">supplemental-ui</text:span>, он может заменить стандартный toolbar. Сейчас потенциально </text:p>
          </table:table-cell>
        </table:table-row>
      </table:table>
      <text:p text:style-name="P3"/>
      <text:p text:style-name="P3">Планируемые файлы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supplemental-ui/css/custom.css</text:span></text:p>
          </table:table-cell>
          <table:table-cell table:style-name="Table2.A1" office:value-type="string">
            <text:p text:style-name="Table_20_Contents">Наш безопасный файл для маленьких CSS-правок: центрирование текста, ширина колонки, отступы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upplemental-ui/partials/head-styles.hbs</text:span></text:p>
          </table:table-cell>
          <table:table-cell table:style-name="Table2.A1" office:value-type="string">
            <text:p text:style-name="Table_20_Contents">Шаблон, через который можно явно подключить <text:span text:style-name="Source_20_Text">site.css</text:span> и затем <text:span text:style-name="Source_20_Text">custom.css</text:span>.</text:p>
          </table:table-cell>
        </table:table-row>
      </table:table>
      <text:p text:style-name="P3"/>
      <text:p text:style-name="P4">Примечание: </text:p>
      <text:p text:style-name="P4">шаблон = конструкция страницы</text:p>
      <text:p text:style-name="P4">CSS = оформление конструкции</text:p>
      <text:p text:style-name="P4">AsciiDoc = содержание книги</text:p>
      <text:p text:style-name="P4"/>
      <text:p text:style-name="P4">Пример:</text:p>
      <text:p text:style-name="P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Элемент</text:p>
            </table:table-cell>
            <table:table-cell table:style-name="Table3.A1" office:value-type="string">
              <text:p text:style-name="Table_20_Heading">Роль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*.hbs</text:span> шаблоны</text:p>
          </table:table-cell>
          <table:table-cell table:style-name="Table3.A1" office:value-type="string">
            <text:p text:style-name="Table_20_Contents">Каркас страницы: где шапка, меню, текст, скрипты, стили</text:p>
          </table:table-cell>
        </table:table-row>
        <table:table-row>
          <table:table-cell table:style-name="Table3.A1" office:value-type="string">
            <text:p text:style-name="Table_20_Contents"><text:span text:style-name="Source_20_Text">*.css</text:span> файлы</text:p>
          </table:table-cell>
          <table:table-cell table:style-name="Table3.A1" office:value-type="string">
            <text:p text:style-name="Table_20_Contents">Внешний вид: ширина, отступы, цвета, шрифты, центрирование</text:p>
          </table:table-cell>
        </table:table-row>
        <table:table-row>
          <table:table-cell table:style-name="Table3.A1" office:value-type="string">
            <text:p text:style-name="Table_20_Contents"><text:span text:style-name="Source_20_Text">*.adoc</text:span> файлы</text:p>
          </table:table-cell>
          <table:table-cell table:style-name="Table3.A1" office:value-type="string">
            <text:p text:style-name="Table_20_Contents">Смысловое содержание книги: текст, разделы, примеры, объяснения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header-rows>
          <text:soft-page-break/>
          <table:table-row>
            <table:table-cell table:style-name="Table4.A1" office:value-type="string">
              <text:p text:style-name="Table_20_Heading">Шаблон</text:p>
            </table:table-cell>
            <table:table-cell table:style-name="Table4.A1" office:value-type="string">
              <text:p text:style-name="Table_20_Heading">Когда используется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partials/head-styles.hbs</text:span></text:p>
          </table:table-cell>
          <table:table-cell table:style-name="Table4.A1" office:value-type="string">
            <text:p text:style-name="Table_20_Contents">при формировании блока <text:span text:style-name="Source_20_Text">&lt;head&gt;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partials/footer-scripts.hbs</text:span></text:p>
          </table:table-cell>
          <table:table-cell table:style-name="Table4.A1" office:value-type="string">
            <text:p text:style-name="Table_20_Contents">внизу страницы, для подключения JavaScript</text:p>
          </table:table-cell>
        </table:table-row>
        <table:table-row>
          <table:table-cell table:style-name="Table4.A1" office:value-type="string">
            <text:p text:style-name="Table_20_Contents"><text:span text:style-name="Source_20_Text">partials/toolbar.hbs</text:span></text:p>
          </table:table-cell>
          <table:table-cell table:style-name="Table4.A1" office:value-type="string">
            <text:p text:style-name="Table_20_Contents">при создании верхней панели страницы</text:p>
          </table:table-cell>
        </table:table-row>
      </table:table>
      <text:p text:style-name="P4"/>
      <text:h text:style-name="P1" text:outline-level="2">Шаг 1. Создать <text:span text:style-name="Source_20_Text">custom.css</text:span></text:h>
      <text:p text:style-name="P4"><draw:frame text:anchor-type="paragraph" draw:z-index="1" draw:name="Text Frame 2" draw:style-name="gr3" draw:text-style-name="P15" svg:width="6.1142in" svg:height="1.8969in" svg:x="0.0272in" svg:y="0.0189in"><draw:text-box><text:p text:style-name="P13"><text:span text:style-name="T2">cat &gt; supplemental-ui/css/custom.css &lt;&lt;'EOF'</text:span></text:p><text:p text:style-name="P14"><text:span text:style-name="T3">/* Custom layout fixes */</text:span></text:p><text:p text:style-name="P14"><text:span text:style-name="T3"/></text:p><text:p text:style-name="P14"><text:span text:style-name="T3">/* Center main article text */</text:span></text:p><text:p text:style-name="P14"><text:span text:style-name="T3">.doc {</text:span></text:p><text:p text:style-name="P14"><text:span text:style-name="T3"><text:s text:c="2"/></text:span><text:span text:style-name="T3">max-width: 920px;</text:span></text:p><text:p text:style-name="P14"><text:span text:style-name="T3"><text:s text:c="2"/></text:span><text:span text:style-name="T3">margin-left: auto;</text:span></text:p><text:p text:style-name="P14"><text:span text:style-name="T3"><text:s text:c="2"/></text:span><text:span text:style-name="T3">margin-right: auto;</text:span></text:p><text:p text:style-name="P14"><text:span text:style-name="T3">}</text:span></text:p><text:p text:style-name="P14"><text:span text:style-name="T3">EOF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text:anchor-type="paragraph" draw:z-index="0" draw:name="Text Frame 1" draw:style-name="gr4" draw:text-style-name="P16" svg:width="7.3295in" svg:height="2.2594in" svg:x="0.1472in" svg:y="0.2272in"><draw:text-box><text:p text:style-name="P8">cat &gt; supplemental-ui/css/custom.css: Утилита cat перенаправляет (&gt;) весь последующий текст в файл custom.css. Если папки supplemental-ui/css не существует, команда выдаст ошибку (перед запуском стоит убедиться, что структура папок создана через mkdir -p supplemental-ui/css).</text:p><text:p text:style-name="P8">&lt;&lt;'EOF': Это конструкция Here Document (here-doc). Она говорит терминалу: «Принимай всё, что я пишу дальше, как текст для файла, пока не встретишь строку EOF». Одинарные кавычки вокруг 'EOF' важны — они отключают подстановку переменных командной строки внутри текста (чтобы символы вроде $ воспринимались просто как текст).</text:p><text:p text:style-name="P8">Тело CSS: Сам код, который центрирует основной текст статьи (.doc) и ограничивает его максимальную ширину до 920 пикселей для более удобного чтения.</text:p><text:p text:style-name="P8">EOF: Маркер конца ввода. Как только терминал видит эту строку, он закрывает и сохраняет файл.</text:p><text:p text:style-name="P8"/></draw:text-box></draw:frame>Пояснение к команде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2"><text:span text:style-name="T1">Шаг</text:span> 2</text:h>
      <text:p text:style-name="Text_20_body">Теперь нужно подключить <text:span text:style-name="Source_20_Text">custom.css</text:span> к страницам книги. Для этого создаём шаблон: <text:s/>supplemental-ui/partials/head-styles.hbs</text:p>
      <text:p text:style-name="Text_20_body"><draw:frame text:anchor-type="paragraph" draw:z-index="2" draw:name="Text Frame 3" draw:style-name="gr2" draw:text-style-name="P12" svg:width="5.2512in" svg:height="0.874in" svg:x="-0.0138in" svg:y="0.0201in"><draw:text-box><text:p>cat &gt; supplemental-ui/partials/head-styles.hbs &lt;&lt;'EOF'</text:p><text:p text:style-name="P11">&lt;link rel="stylesheet" href="{{{uiRootPath}}}/css/site.css"&gt;</text:p><text:p text:style-name="P11">&lt;link rel="stylesheet" href="{{{uiRootPath}}}/css/custom.css"&gt;</text:p><text:p text:style-name="P11">EOF</text:p></draw:text-box></draw:frame></text:p>
      <text:p text:style-name="Text_20_body"/>
      <text:p text:style-name="P7"/>
      <text:p text:style-name="P7"/>
      <text:p text:style-name="P7"/>
      <text:p text:style-name="P7"><text:soft-page-break/></text:p>
      <text:p text:style-name="P7"/>
      <text:p text:style-name="P6"><draw:frame text:anchor-type="paragraph" draw:z-index="3" draw:name="Text Frame 4" draw:style-name="gr1" draw:text-style-name="P10" svg:width="6.2921in" svg:height="5.9079in" svg:x="-0.148in" svg:y="-0.0429in"><draw:text-box><text:p text:style-name="P8">Эта строка — фрагмент шаблона на языке Handlebars (именно этот шаблонизатор используется в Antora по умолчанию для генерации UI).</text:p><text:p text:style-name="P8">Она подключает основной файл стилей вашего сайта документации. Давайте разберем синтаксис по деталям:</text:p><text:p text:style-name="P9">1. Тройные фигурные скобки {{{ ... }}}</text:p><text:p text:style-name="P8">В Handlebars двойные скобки {{variable}} автоматически экранируют HTML-символы (превращают &lt; в &amp;lt; и т.д.). Тройные скобки {{{variable}}} отменяют экранирование. Они выводят значение переменной «как есть». Это необходимо, так как пути к файлам могут содержать специальные символы (например, слэши /), которые должны остаться нетронутыми, чтобы браузер правильно понял путь.</text:p><text:p text:style-name="P9">2. Переменная uiRootPath</text:p><text:p text:style-name="P8">Это встроенная переменная Antora. Во время сборки сайта Antora автоматически вычисляет и подставляет сюда относительный путь от текущей страницы до корня папки с ресурсами UI (пользовательского интерфейса).</text:p><text:p text:style-name="P8">Почему путь именно относительный? Antora генерирует статический сайт, который должен корректно работать и локально на вашем компьютере (без веб-сервера), и на любом хостинге.</text:p><text:p text:style-name="P8">Если пользователь читает страницу на верхнем уровне ([https://site.com/index.html](https://site.com/index.html)), uiRootPath превратится в .. Итоговый путь будет: href="./css/site.css".</text:p><text:p text:style-name="P8">Если пользователь ушел глубоко в подразделы ([https://site.com/component/version/module/page.html](https://site.com/component/version/module/page.html)), Antora автоматически поднимется на нужный уровень. uiRootPath превратится в ../../... Итоговый путь будет: href="../../../css/site.css".</text:p><text:p text:style-name="P9">3. Остальной путь /css/site.css</text:p><text:p text:style-name="P8">Это статическая часть пути. Antora берет значение uiRootPath и пристыковывает к нему /css/site.css, чтобы сослаться на главный файл стилей, который лежит в собранном бандле UI.</text:p><text:p text:style-name="P8"/></draw:text-box></draw:frame></text:p>
      <text:p text:style-name="Text_20_body"/>
      <text:p text:style-name="Text_20_body"/>
      <text:p text:style-name="Text_20_body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c520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c5201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c5201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4" meta:image-count="0" meta:object-count="0" meta:page-count="3" meta:paragraph-count="48" meta:word-count="211" meta:character-count="1926" meta:non-whitespace-character-count="1750"/>
  </office:meta>
</office:document-meta>
</file>