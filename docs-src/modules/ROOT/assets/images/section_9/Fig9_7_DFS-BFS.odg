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7000000FACB4EF85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3.136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2.50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T1" style:family="text">
      <style:text-properties fo:font-size="16pt" style:font-size-asian="10.5pt" style:font-size-complex="10.5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Noto Sans Devanagari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001cm" svg:height="6.614cm" svg:x="2.587cm" svg:y="2.006cm">
          <draw:image xlink:href="Pictures/1000000000000237000000FACB4EF857.png" xlink:type="simple" xlink:show="embed" xlink:actuate="onLoad" draw:mime-type="image/png">
            <text:p/>
          </draw:image>
        </draw:frame>
        <draw:frame draw:style-name="gr2" draw:text-style-name="P2" draw:layer="layout" svg:width="7.42cm" svg:height="3.386cm" svg:x="12.142cm" svg:y="8.626cm">
          <draw:text-box>
            <text:p><text:span text:style-name="T1">BFS (Breadth-First Search): Queue </text:span></text:p>
            <text:p><text:span text:style-name="T1">Start Peak: V₀ </text:span></text:p>
            <text:p><text:span text:style-name="T1">Final order of visits: </text:span></text:p>
            <text:p><text:span text:style-name="T1">V₀, V₁, V₃, V₂, V₄, V₅, V₆.</text:span></text:p>
          </draw:text-box>
        </draw:frame>
        <draw:frame draw:style-name="gr3" draw:text-style-name="P2" draw:layer="layout" svg:width="7.302cm" svg:height="3.386cm" svg:x="3.153cm" svg:y="8.62cm">
          <draw:text-box>
            <text:p><text:span text:style-name="T1">DFS (Depth-First Search): Stack </text:span></text:p>
            <text:p><text:span text:style-name="T1">Start Peak: V₀ </text:span></text:p>
            <text:p><text:span text:style-name="T1">Final order of visits: </text:span></text:p>
            <text:p><text:span text:style-name="T2">V₀, V₁, </text:span><text:span text:style-name="T1">V₂, V₃ , V₄, V₅, V₆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4T22:27:52.566735944</meta:creation-date>
    <dc:date>2026-07-04T23:27:25.553951550</dc:date>
    <meta:editing-duration>PT6M22S</meta:editing-duration>
    <meta:editing-cycles>1</meta:editing-cycles>
    <meta:document-statistic meta:object-count="3"/>
    <meta:generator>LibreOffice/24.2.7.2$Linux_X86_64 LibreOffice_project/420$Build-2</meta:generator>
  </office:meta>
</office:document-meta>
</file>