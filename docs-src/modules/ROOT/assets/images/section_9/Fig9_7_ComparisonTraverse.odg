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A00000463E39E92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6.871cm" svg:x="1cm" svg:y="1.414cm">
          <draw:image xlink:href="Pictures/100000010000031A00000463E39E924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04T18:14:45.702269479</dc:date>
    <meta:editing-duration>PT37M6S</meta:editing-duration>
    <meta:editing-cycles>1</meta:editing-cycles>
    <meta:document-statistic meta:object-count="1"/>
    <meta:generator>LibreOffice/24.2.7.2$Linux_X86_64 LibreOffice_project/420$Build-2</meta:generator>
  </office:meta>
</office:document-meta>
</file>