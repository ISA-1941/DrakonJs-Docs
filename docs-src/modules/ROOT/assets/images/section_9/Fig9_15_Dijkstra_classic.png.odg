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900000248A03021EF.png" manifest:media-type="image/png"/>
  <manifest:file-entry manifest:full-path="Pictures/100D31D00002E8240001FB1E98D1161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080808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dark1" loext:color-type="theme">
          <loext:transformation loext:type="lummod" loext:value="9500"/>
          <loext:transformation loext:type="lumoff" loext:value="320"/>
        </loext:fill-complex-color>
      </style:graphic-properties>
    </style:style>
    <style:style style:name="P1" style:family="paragraph">
      <loext:graphic-properties draw:fill-color="#08080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0.499cm" svg:height="129.821cm" svg:x="0cm" svg:y="0.795cm">
          <draw:image xlink:href="Pictures/100D31D00002E8240001FB1E98D11616.svg" xlink:type="simple" xlink:show="embed" xlink:actuate="onLoad" draw:mime-type="image/svg+xml">
            <text:p/>
          </draw:image>
          <draw:image xlink:href="Pictures/100000010000035900000248A03021E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1cm" fo:margin-bottom="6.51cm" fo:margin-left="6.51cm" fo:margin-right="6.51cm" fo:page-width="190.5cm" fo:page-height="129.8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0T11:18:50.673707743</dc:date>
    <meta:editing-duration>PT16M32S</meta:editing-duration>
    <meta:editing-cycles>1</meta:editing-cycles>
    <meta:document-statistic meta:object-count="1"/>
    <meta:generator>LibreOffice/24.2.7.2$Linux_X86_64 LibreOffice_project/420$Build-2</meta:generator>
  </office:meta>
</office:document-meta>
</file>